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5000000FCA35B4D85.png" manifest:media-type="image/png"/>
  <manifest:file-entry manifest:full-path="Pictures/1000000100000260000000ACBF8E67B7.png" manifest:media-type="image/png"/>
  <manifest:file-entry manifest:full-path="Pictures/100000010000077000000332F53D67E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ffffd7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Helvetica" officeooo:rsid="000e32a3" officeooo:paragraph-rsid="000e32a3"/>
    </style:style>
    <style:style style:name="P2" style:family="paragraph" style:parent-style-name="Table_20_Contents">
      <style:text-properties style:font-name="Helvetica" fo:font-weight="bold" officeooo:rsid="000e32a3" officeooo:paragraph-rsid="000e32a3" style:font-weight-asian="bold" style:font-weight-complex="bold"/>
    </style:style>
    <style:style style:name="P3" style:family="paragraph" style:parent-style-name="Table_20_Contents">
      <style:text-properties style:font-name="Helvetica"/>
    </style:style>
    <style:style style:name="P4" style:family="paragraph" style:parent-style-name="Table_20_Contents">
      <style:text-properties style:font-name="Helvetica" officeooo:rsid="000e32a3" officeooo:paragraph-rsid="000e32a3"/>
    </style:style>
    <style:style style:name="P5" style:family="paragraph" style:parent-style-name="Standard" style:list-style-name="L1">
      <style:text-properties officeooo:paragraph-rsid="000f8e97"/>
    </style:style>
    <style:style style:name="P6" style:family="paragraph" style:parent-style-name="Standard" style:list-style-name="L1">
      <style:text-properties fo:font-size="14pt" fo:font-weight="bold" officeooo:paragraph-rsid="000f8e97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0f8e97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Google Sans Text" officeooo:rsid="000f8e97" officeooo:paragraph-rsid="000f8e97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bold" officeooo:paragraph-rsid="000f8e97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f8e97" officeooo:paragraph-rsid="000f8e97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f8e97"/>
    </style:style>
    <style:style style:name="T1" style:family="text">
      <style:text-properties officeooo:rsid="000f8e97"/>
    </style:style>
    <style:style style:name="T2" style:family="text">
      <style:text-properties officeooo:rsid="00107ec2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 officeooo:rsid="000f8e97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">Projektowanie Oprogramowania Systemów - <text:span text:style-name="T1">3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2">Projekt</text:p>
          </table:table-cell>
          <table:table-cell table:style-name="Tabela1.B2" table:number-columns-spanned="3" office:value-type="string">
            <text:p text:style-name="P3">Automatyczny pomiar funkcji 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2">Wykonujący:</text:p>
          </table:table-cell>
          <table:table-cell table:style-name="Tabela1.B3" table:number-columns-spanned="2" office:value-type="string">
            <text:p text:style-name="P4">Piotr Krzyżanowski 193675</text:p>
            <text:p text:style-name="P4">Hubert Kowalski 193638 </text:p>
          </table:table-cell>
          <table:covered-table-cell/>
          <table:table-cell table:style-name="Tabela1.D3" table:number-rows-spanned="2" office:value-type="string">
            <text:p text:style-name="P4">Ocena:</text:p>
          </table:table-cell>
        </table:table-row>
        <table:table-row table:style-name="Tabela1.1">
          <table:table-cell table:style-name="Tabela1.A2" office:value-type="string">
            <text:p text:style-name="P2">Specjalność:</text:p>
          </table:table-cell>
          <table:table-cell table:style-name="Tabela1.B4" table:number-columns-spanned="2" office:value-type="string">
            <text:p text:style-name="P4">Inżynieria dźwięku i obrazu</text:p>
          </table:table-cell>
          <table:covered-table-cell/>
          <table:covered-table-cell table:style-name="Tabela1.D3"/>
        </table:table-row>
        <table:table-row table:style-name="Tabela1.1">
          <table:table-cell table:style-name="Tabela1.A5" office:value-type="string">
            <text:p text:style-name="P2">Data wykonania ćwiczenia:</text:p>
          </table:table-cell>
          <table:table-cell table:style-name="Tabela1.B5" office:value-type="string">
            <text:p text:style-name="P3">1<text:span text:style-name="T2">7</text:span>.06.2026 </text:p>
          </table:table-cell>
          <table:table-cell table:style-name="Tabela1.C5" office:value-type="string">
            <text:p text:style-name="P3"/>
          </table:table-cell>
          <table:table-cell table:style-name="Tabela1.D5" office:value-type="string">
            <text:p text:style-name="P3"/>
          </table:table-cell>
        </table:table-row>
      </table:table>
      <text:list text:style-name="L1">
        <text:list-header>
          <text:p text:style-name="P5"><text:line-break/><text:line-break/></text:p>
        </text:list-header>
        <text:list-item>
          <text:p text:style-name="P6">Opis wykonanych operacji</text:p>
          <text:p text:style-name="P7"><text:line-break/><text:bookmark text:name="p-rc_ec1012bbe2332aff-133"/><text:span text:style-name="T3">W ramach realizacji punktu trzeciego, opracowano krótką specyfikację techniczną. Została ona umieszczona w repozytorium GitHub w pliku </text:span><text:span text:style-name="Source_20_Text"><text:span text:style-name="T4">specyfikacja_techniczna.md</text:span></text:span><text:span text:style-name="T3"> w folderze </text:span><text:span text:style-name="Source_20_Text"><text:span text:style-name="T4">/docs</text:span></text:span><text:span text:style-name="T3">. Dokument ten podsumowuje zaprojektowany model UML, na który składają się m.in. diagram komponentów oraz diagram klas.</text:span></text:p>
          <text:p text:style-name="P8"/>
          <text:p text:style-name="P7"><text:span text:style-name="T3">Dodatkowo przeprowadzono analizę używanych bibliotek i narzędzi do realizacji zadania. Wskazano wykorzystanie środowisk Python i C++, bibliotek matematycznych i sygnałowych (</text:span><text:span text:style-name="Source_20_Text"><text:span text:style-name="T4">numpy</text:span></text:span><text:span text:style-name="T4">, </text:span><text:span text:style-name="Source_20_Text"><text:span text:style-name="T4">scipy.signal</text:span></text:span><text:span text:style-name="T3">) oraz wybrano narzędzia pozwalające zrealizować kolejne etapy projektu: framework </text:span><text:span text:style-name="Source_20_Text"><text:span text:style-name="T4">pytest</text:span></text:span><text:span text:style-name="T3"> do testów jednostkowych, narzędzie </text:span><text:span text:style-name="Source_20_Text"><text:span text:style-name="T4">cProfile</text:span></text:span><text:span text:style-name="T3"> do optymalizacji oraz paczkę </text:span><text:span text:style-name="Source_20_Text"><text:span text:style-name="T4">pdoc</text:span></text:span><text:span text:style-name="T4">/</text:span><text:span text:style-name="Source_20_Text"><text:span text:style-name="T4">Sphinx</text:span></text:span><text:span text:style-name="T3"> do generowania dokumentacji HTML. Zdefiniowano również harmonogram i podział ról w zespole, w ramach którego Piotr pełni rolę Maintainera, a Hubert odpowiada za refaktoryzację, dokumentację HTML, testy i profilowanie wydajnościowe.</text:span><text:line-break/><text:line-break/></text:p>
        </text:list-item>
        <text:list-item>
          <text:p text:style-name="P9">Dowody realizacji (zrzuty ekranu i diagramy):</text:p>
          <text:p text:style-name="P9"><text:s/></text:p>
          <text:p text:style-name="P10">Diagram komponentów:</text:p>
          <text:p text:style-name="P11"><text:line-break/><draw:frame draw:style-name="fr1" draw:name="Obraz1" text:anchor-type="char" svg:width="16.088cm" svg:height="4.551cm" draw:z-index="0"><draw:image xlink:href="Pictures/1000000100000260000000ACBF8E67B7.png" xlink:type="simple" xlink:show="embed" xlink:actuate="onLoad" draw:mime-type="image/png"/></draw:frame><text:line-break/><text:line-break/><text:line-break/><text:line-break/></text:p>
          <text:p text:style-name="P11"><draw:frame draw:style-name="fr2" draw:name="Obraz2" text:anchor-type="paragraph" svg:x="1.281cm" svg:y="0.718cm" svg:width="14.104cm" svg:height="6.668cm" draw:z-index="1"><draw:image xlink:href="Pictures/1000000100000215000000FCA35B4D85.png" xlink:type="simple" xlink:show="embed" xlink:actuate="onLoad" draw:mime-type="image/png"/></draw:frame><text:soft-page-break/><text:span text:style-name="T5">Diagram klas:<text:line-break/></text:span><text:line-break/><text:span text:style-name="T5">Fragment specyfikacji technicznej:</text:span><draw:frame draw:style-name="fr3" draw:name="Obraz3" text:anchor-type="char" svg:x="1.134cm" svg:y="8.564cm" svg:width="16.365cm" svg:height="7.036cm" draw:z-index="2"><draw:image xlink:href="Pictures/100000010000077000000332F53D67ED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1T15:48:23.123353900</meta:creation-date>
    <dc:date>2026-06-21T17:49:24.678439900</dc:date>
    <meta:editing-duration>PT1H38M1S</meta:editing-duration>
    <meta:editing-cycles>2</meta:editing-cycles>
    <meta:generator>LibreOffice/25.8.7.1$Windows_X86_64 LibreOffice_project/39c3b7ac021cfb9f4ca681457ad36828f90e2ce7</meta:generator>
    <meta:document-statistic meta:table-count="1" meta:image-count="3" meta:object-count="0" meta:page-count="2" meta:paragraph-count="20" meta:word-count="153" meta:character-count="1265" meta:non-whitespace-character-count="1116"/>
  </office:meta>
</office:document-meta>
</file>