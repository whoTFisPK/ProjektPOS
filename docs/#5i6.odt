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3B00000056482477B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1" style:family="table-row">
      <style:table-row-properties style:min-row-height="1.185cm"/>
    </style:style>
    <style:style style:name="Tabela1.A1" style:family="table-cell">
      <style:table-cell-properties style:vertical-align="middle" fo:background-color="#ffffd7" fo:padding="0.097cm" fo:border="0.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Helvetica" officeooo:rsid="000e32a3" officeooo:paragraph-rsid="000adba5"/>
    </style:style>
    <style:style style:name="P2" style:family="paragraph" style:parent-style-name="Table_20_Contents">
      <style:paragraph-properties fo:text-align="justify" style:justify-single-word="false"/>
      <style:text-properties style:font-name="Helvetica" fo:font-weight="bold" officeooo:rsid="000e32a3" officeooo:paragraph-rsid="000adba5" style:font-weight-asian="bold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style:font-name="Helvetica" officeooo:paragraph-rsid="000adba5"/>
    </style:style>
    <style:style style:name="P4" style:family="paragraph" style:parent-style-name="Standard">
      <style:paragraph-properties fo:text-align="justify" style:justify-single-word="false"/>
      <style:text-properties officeooo:paragraph-rsid="000adba5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4pt" fo:font-weight="bold" officeooo:paragraph-rsid="000bff46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0bff46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bold" officeooo:paragraph-rsid="000bff4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paragraph-rsid="000bff46" style:font-weight-asian="bold" style:font-weight-complex="bold"/>
    </style:style>
    <style:style style:name="P9" style:family="paragraph" style:parent-style-name="Standard" style:list-style-name="L2">
      <style:paragraph-properties fo:text-align="justify" style:justify-single-word="false"/>
      <style:text-properties style:text-underline-style="solid" style:text-underline-width="auto" style:text-underline-color="font-color" officeooo:paragraph-rsid="000bff46"/>
    </style:style>
    <style:style style:name="P10" style:family="paragraph" style:parent-style-name="Standard" style:list-style-name="L2">
      <style:paragraph-properties fo:text-align="justify" style:justify-single-word="false"/>
      <style:text-properties officeooo:paragraph-rsid="000bff46"/>
    </style:style>
    <style:style style:name="P11" style:family="paragraph" style:parent-style-name="Standard" style:list-style-name="L3">
      <style:paragraph-properties fo:text-align="justify" style:justify-single-word="false"/>
      <style:text-properties officeooo:paragraph-rsid="000bff46"/>
    </style:style>
    <style:style style:name="P12" style:family="paragraph" style:parent-style-name="Standard">
      <style:paragraph-properties fo:text-align="justify" style:justify-single-word="false"/>
      <style:text-properties officeooo:paragraph-rsid="000bff46"/>
    </style:style>
    <style:style style:name="P1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paragraph-rsid="000bff46"/>
    </style:style>
    <style:style style:name="P14" style:family="paragraph" style:parent-style-name="Standard" style:list-style-name="L3">
      <style:paragraph-properties fo:text-align="justify" style:justify-single-word="false"/>
      <style:text-properties fo:font-weight="normal" officeooo:paragraph-rsid="000bff46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paragraph-rsid="000bff46" style:font-weight-asian="normal" style:font-weight-complex="normal"/>
    </style:style>
    <style:style style:name="P16" style:family="paragraph" style:parent-style-name="Standard" style:list-style-name="L4">
      <style:paragraph-properties fo:text-align="justify" style:justify-single-word="false"/>
      <style:text-properties officeooo:paragraph-rsid="000bff46"/>
    </style:style>
    <style:style style:name="P17" style:family="paragraph" style:parent-style-name="Standard">
      <style:paragraph-properties fo:text-align="start" style:justify-single-word="false"/>
      <style:text-properties officeooo:paragraph-rsid="000bff46"/>
    </style:style>
    <style:style style:name="P18" style:family="paragraph" style:parent-style-name="Standard" style:list-style-name="L5">
      <style:paragraph-properties fo:text-align="start" style:justify-single-word="false"/>
      <style:text-properties officeooo:paragraph-rsid="000bff46"/>
    </style:style>
    <style:style style:name="T1" style:family="text">
      <style:text-properties officeooo:rsid="000adba5"/>
    </style:style>
    <style:style style:name="T2" style:family="text">
      <style:text-properties officeooo:rsid="000c02e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table:number-columns-spanned="4" office:value-type="string">
            <text:p text:style-name="P1">Projektowanie Oprogramowania Systemów – <text:span text:style-name="T1">5, 6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2">Projekt</text:p>
          </table:table-cell>
          <table:table-cell table:style-name="Tabela1.B2" table:number-columns-spanned="3" office:value-type="string">
            <text:p text:style-name="P3">Automatyczny pomiar funkcji 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2">Wykonujący:</text:p>
          </table:table-cell>
          <table:table-cell table:style-name="Tabela1.B3" table:number-columns-spanned="2" office:value-type="string">
            <text:p text:style-name="P1">Piotr Krzyżanowski 193675</text:p>
            <text:p text:style-name="P1">Hubert Kowalski 193638 </text:p>
          </table:table-cell>
          <table:covered-table-cell/>
          <table:table-cell table:style-name="Tabela1.D3" table:number-rows-spanned="2" office:value-type="string">
            <text:p text:style-name="P1">Ocena:</text:p>
          </table:table-cell>
        </table:table-row>
        <table:table-row table:style-name="Tabela1.1">
          <table:table-cell table:style-name="Tabela1.A2" office:value-type="string">
            <text:p text:style-name="P2">Specjalność:</text:p>
          </table:table-cell>
          <table:table-cell table:style-name="Tabela1.B4" table:number-columns-spanned="2" office:value-type="string">
            <text:p text:style-name="P1">Inżynieria dźwięku i obrazu</text:p>
          </table:table-cell>
          <table:covered-table-cell/>
          <table:covered-table-cell table:style-name="Tabela1.D3"/>
        </table:table-row>
        <table:table-row table:style-name="Tabela1.1">
          <table:table-cell table:style-name="Tabela1.A5" office:value-type="string">
            <text:p text:style-name="P2">Data wykonania ćwiczenia:</text:p>
          </table:table-cell>
          <table:table-cell table:style-name="Tabela1.B5" office:value-type="string">
            <text:p text:style-name="P3"><text:span text:style-name="T2">19</text:span>.06.2026 </text:p>
          </table:table-cell>
          <table:table-cell table:style-name="Tabela1.C5" office:value-type="string">
            <text:p text:style-name="P3"/>
          </table:table-cell>
          <table:table-cell table:style-name="Tabela1.D5" office:value-type="string">
            <text:p text:style-name="P3"/>
          </table:table-cell>
        </table:table-row>
      </table:table>
      <text:p text:style-name="P4"/>
      <text:list text:style-name="L1">
        <text:list-item>
          <text:p text:style-name="P5">Raportowanie błędów, podejście TDD oraz testy jednostkowe </text:p>
          <text:p text:style-name="P6"/>
          <text:list>
            <text:list-item>
              <text:p text:style-name="P7">Raportowanie błędów w systemie śledzenia (Bug Tracking) </text:p>
            </text:list-item>
          </text:list>
        </text:list-item>
      </text:list>
      <text:p text:style-name="P8"/>
      <text:p text:style-name="P8"><text:tab/><text:span text:style-name="T3">W ramach symulacji cyklu testowania oprogramowania, w systemie śledzenia błędów <text:tab/>zarejestrowano i pomyślnie rozwiązano krytyczne zgłoszenia. Poniżej znajduje się <text:tab/>wyciąg z rejestru błędów:</text:span> </text:p>
      <text:list xml:id="list174837476296673" text:continue-numbering="true" text:style-name="L1">
        <text:list-item>
          <text:list>
            <text:list-header>
              <text:p text:style-name="P6"/>
            </text:list-header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9">Przepełnienie bufora UART przy szybkich zmianach pozycji</text:p>
                  <text:p text:style-name="P10"/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p text:style-name="P11">Opis: Podczas generowania dużej liczby punktów pomiarowych, aplikacja w Pythonie wysyłała ramki współrzędnych szybciej, niż Arduino było w stanie przetworzyć zapytanie <text:span text:style-name="T4">`Serial.parseInt()`</text:span>. Skutkowało to gubieniem znaków końca linii <text:span text:style-name="T4">`\n`</text:span> i błędnym pozycjonowaniem.</text:p>
                      <text:p text:style-name="P11"/>
                    </text:list-item>
                    <text:list-item>
                      <text:p text:style-name="P11">Rozwiązanie: Wprowadzono pętlę blokującą w Pythonie, która bezwzględnie oczekuje na komunikat <text:span text:style-name="T4">`"done"`</text:span> z Arduino przed wysłaniem kolejnej ramki.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2"/>
      <text:list text:continue-numbering="true" text:style-name="L3">
        <text:list-item>
          <text:list>
            <text:list-item>
              <text:list>
                <text:list-item>
                  <text:p text:style-name="P13">Wycinanie bezpośredniej fali (t0) przy ujemnych wartościach pre_ms</text:p>
                  <text:p text:style-name="P11"/>
                  <text:list>
                    <text:list-item>
                      <text:p text:style-name="P11">Opis: W funkcji <text:span text:style-name="T4">`measure_ir_sweep`</text:span>, przy próbie ustawienia ujemnego marginesu czasu przed impulsem, indeksowanie tablicy <text:span text:style-name="T4">`t0 - pre`</text:span> przyjmowało wartości spoza zakresu, co crashowało skrypt.</text:p>
                      <text:p text:style-name="P11"/>
                    </text:list-item>
                    <text:list-item>
                      <text:p text:style-name="P14">Rozwiązanie: Dodano walidację typów i zabezpieczenie <text:span text:style-name="T4">`max(0, t0 - pre)` </text:span>gwarantujące nieprzekroczenie granic tablicy NumPy. 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/>
      <text:list xml:id="list174836044059424" text:continue-list="list174837476296673" text:style-name="L1">
        <text:list-item>
          <text:list>
            <text:list-item>
              <text:p text:style-name="P7">Metodyka Test-Driven Development (TDD) – Zapewnienie Jakości </text:p>
            </text:list-item>
          </text:list>
        </text:list-item>
      </text:list>
      <text:p text:style-name="P8"/>
      <text:p text:style-name="P12"><text:span text:style-name="T5"><text:tab/></text:span>W celu zapewnienia bezbłędnego działania algorytmów cyfrowego przetwarzania sygnałów <text:tab/>(DSP), przed napisaniem właściwego kodu implementacji zastosowano technikę TDD <text:tab/>(Czerwony-Zielony-Refaktor).</text:p>
      <text:p text:style-name="P12"/>
      <text:p text:style-name="P12"><text:tab/>Wprowadzono założenie projektowe: funkcja odpowiedzialna za okienkowanie czasowe <text:tab/>(bramkowanie odpowiedzi impulsowej) musi automatycznie dopasować długość okna <text:tab/>wygładzającego Tukey'a do wyciętego fragmentu sygnału.</text:p>
      <text:list text:style-name="L4">
        <text:list-item>
          <text:p text:style-name="P16"><text:soft-page-break/>Faza Czerwona: Napisano test sprawdzający, czy długość okna jest identyczna z długością wyciętego sygnału. Test zakończył się niepowodzeniem (brak implementacji funkcji).</text:p>
          <text:p text:style-name="P16"/>
        </text:list-item>
        <text:list-item>
          <text:p text:style-name="P16">Faza Zielona: Zaimplementowano kod <text:span text:style-name="T4">`window = sig.windows.tukey(len(hrir_left), alpha=0.25)`</text:span> i przemnożenie sygnału. Test przeszedł pomyślnie.</text:p>
          <text:p text:style-name="P16"/>
        </text:list-item>
        <text:list-item>
          <text:p text:style-name="P16">Faza Refaktoru: Zoptymalizowano operację do postaci wektorowej NumPy <text:span text:style-name="T4">(`hrir_left *= window`)</text:span>, zapewniając maksymalną wydajność CPU. </text:p>
        </text:list-item>
      </text:list>
      <text:p text:style-name="P12"/>
      <text:p text:style-name="P12"/>
      <text:list text:continue-list="list174836044059424" text:style-name="L1">
        <text:list-item>
          <text:list>
            <text:list-item>
              <text:p text:style-name="P7">Testy Jednostkowe do Walidacji Oprogramowania </text:p>
            </text:list-item>
          </text:list>
        </text:list-item>
      </text:list>
      <text:p text:style-name="P8"/>
      <text:p text:style-name="P12"><text:span text:style-name="T5"><text:tab/></text:span>Stworzono dedykowany kod testów jednostkowych, który symuluje zachowanie algorytmów <text:tab/>bez potrzeby podłączania fizycznego Arduino i głośników.</text:p>
      <text:p text:style-name="P12"/>
      <text:p text:style-name="P12"><text:tab/>Wynik wykonania walidacji i testów jednostkowych oprogramowania:</text:p>
      <text:p text:style-name="P12"><text:tab/><draw:frame draw:style-name="fr1" draw:name="Obraz1" text:anchor-type="char" svg:x="1.425cm" svg:y="0cm" svg:width="15.109cm" svg:height="2.275cm" draw:z-index="0"><draw:image xlink:href="Pictures/100000010000023B00000056482477B4.png" xlink:type="simple" xlink:show="embed" xlink:actuate="onLoad" draw:mime-type="image/png"/></draw:frame></text:p>
      <text:p text:style-name="P12"/>
      <text:list text:continue-numbering="true" text:style-name="L1">
        <text:list-item>
          <text:list>
            <text:list-item>
              <text:p text:style-name="P7">Optymalizacja </text:p>
              <text:p text:style-name="P6"/>
              <text:p text:style-name="P6">Za pomocą narzędzia cProfile zidentyfikowano główne punkty krytyczne (hotspots) w opracowanym programie. Największe obciążenie procesora generowała funkcja dekonwolucji <text:span text:style-name="T4">`scipy.signal.convolve`</text:span> realizowana w dziedzinie czasu dla sygnałów o częstotliwości 48 kHz. Optymalizację tego punktu można przeprowadzić poprzez zastąpienie splotu czasowego splotem w dziedzinie częstotliwości <text:span text:style-name="T4">(`scipy.signal.fftconvolve`)</text:span>, co skróciłoby czas obliczeń ponad stukrotnie. Drugim zidentyfikowanym hotspotem były operacje wejścia/wyjścia (zapis plików WAV w pętli pomiarowej). Zoptymalizować to można poprzez buforowanie wyników w pamięci RAM i ich seryjny zapis na dysk po zakończeniu procedury ruchu. </text:p>
            </text:list-item>
          </text:list>
        </text:list-item>
      </text:list>
      <text:p text:style-name="P17"/>
      <text:list text:style-name="L5">
        <text:list-header>
          <text:p text:style-name="P18"><text:line-break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1T16:53:27.342228800</meta:creation-date>
    <dc:date>2026-06-21T17:48:35.555271000</dc:date>
    <meta:editing-duration>PT3M3S</meta:editing-duration>
    <meta:editing-cycles>1</meta:editing-cycles>
    <meta:document-statistic meta:table-count="1" meta:image-count="1" meta:object-count="0" meta:page-count="2" meta:paragraph-count="37" meta:word-count="392" meta:character-count="3265" meta:non-whitespace-character-count="2895"/>
    <meta:generator>LibreOffice/25.8.7.1$Windows_X86_64 LibreOffice_project/39c3b7ac021cfb9f4ca681457ad36828f90e2ce7</meta:generator>
  </office:meta>
</office:document-meta>
</file>