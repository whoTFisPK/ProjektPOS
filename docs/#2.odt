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1E0000025437B90BCD.png" manifest:media-type="image/png"/>
  <manifest:file-entry manifest:full-path="Pictures/1000000100000138000002004BABB411.png" manifest:media-type="image/png"/>
  <manifest:file-entry manifest:full-path="Pictures/1000000100000750000002FA2F5CC75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1ad969" officeooo:paragraph-rsid="001ad969"/>
    </style:style>
    <style:style style:name="P2" style:family="paragraph" style:parent-style-name="Standard">
      <style:paragraph-properties fo:text-align="justify" style:justify-single-word="false"/>
      <style:text-properties officeooo:rsid="001ad969" officeooo:paragraph-rsid="001ad969"/>
    </style:style>
    <style:style style:name="P3" style:family="paragraph" style:parent-style-name="Standard">
      <style:paragraph-properties fo:text-align="justify" style:justify-single-word="false"/>
      <style:text-properties officeooo:paragraph-rsid="001ad969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Krótki opis podsumowanych działań</text:p>
        </text:list-item>
      </text:list>
      <text:p text:style-name="P2"/>
      <text:p text:style-name="P3">W ramach realizacji punktu 2, utworzono repozytorium projektu w serwisie GitHub (tutaj wklej link). Zaplanowano strukturę katalogów dostosowaną do specyfiki projektu, wydzielając kod dla mikrokontrolera (Arduino), skrypty na PC (Python) oraz miejsce na dokumentację. Na podstawie analizy ról w zespole, na stanowisko Maintainera dbającego o porządek w repozytorium wyznaczono Piotra. Skonfigurowano również system śledzenia błędów i zadań z wykorzystaniem wbudowanej zakładki GitHub Issues.</text:p>
      <text:p text:style-name="P3"/>
      <text:p text:style-name="P3"/>
      <text:list text:continue-numbering="true" text:style-name="L1">
        <text:list-item>
          <text:p text:style-name="P1">Zrzuty ekranu</text:p>
        </text:list-item>
      </text:list>
      <text:p text:style-name="P2"/>
      <text:p text:style-name="P2"><draw:frame draw:style-name="fr1" draw:name="Obraz1" text:anchor-type="as-char" svg:width="6.604cm" svg:height="10.837cm" draw:z-index="0"><draw:image xlink:href="Pictures/1000000100000138000002004BABB411.png" xlink:type="simple" xlink:show="embed" xlink:actuate="onLoad" draw:mime-type="image/png"/></draw:frame><text:line-break/><text:line-break/><draw:frame draw:style-name="fr1" draw:name="Obraz2" text:anchor-type="as-char" svg:width="17cm" svg:height="6.468cm" draw:z-index="1"><draw:image xlink:href="Pictures/100000010000061E0000025437B90BCD.png" xlink:type="simple" xlink:show="embed" xlink:actuate="onLoad" draw:mime-type="image/png"/></draw:frame><text:line-break/><text:line-break/><text:tab/><text:line-break/><text:line-break/><text:line-break/><text:soft-page-break/><draw:frame draw:style-name="fr2" draw:name="Obraz3" text:anchor-type="as-char" svg:width="17cm" svg:height="6.92cm" draw:z-index="2"><draw:image xlink:href="Pictures/1000000100000750000002FA2F5CC759.png" xlink:type="simple" xlink:show="embed" xlink:actuate="onLoad" draw:mime-type="image/png"/></draw:frame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22:34:28.702918200</meta:creation-date>
    <meta:print-date>2026-06-17T22:49:03.901684500</meta:print-date>
    <meta:printed-by>Pliki PDF</meta:printed-by>
    <dc:date>2026-06-17T22:49:45.403588000</dc:date>
    <meta:editing-duration>PT41S</meta:editing-duration>
    <meta:editing-cycles>1</meta:editing-cycles>
    <meta:document-statistic meta:table-count="0" meta:image-count="3" meta:object-count="0" meta:page-count="2" meta:paragraph-count="4" meta:word-count="71" meta:character-count="553" meta:non-whitespace-character-count="474"/>
    <meta:generator>LibreOffice/25.8.6.2$Windows_X86_64 LibreOffice_project/b4b39682cd9868fa725bc664aff94278d315bd04</meta:generator>
  </office:meta>
</office:document-meta>
</file>