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1E0000025437B90BCD.png" manifest:media-type="image/png"/>
  <manifest:file-entry manifest:full-path="Pictures/1000000100000138000002004BABB411.png" manifest:media-type="image/png"/>
  <manifest:file-entry manifest:full-path="Pictures/1000000100000750000002FA2F5CC75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1" style:family="table-row">
      <style:table-row-properties style:min-row-height="1.185cm"/>
    </style:style>
    <style:style style:name="Tabela1.A1" style:family="table-cell">
      <style:table-cell-properties style:vertical-align="middle" fo:background-color="#ffffd7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libri" officeooo:rsid="000e32a3" officeooo:paragraph-rsid="001c27b6"/>
    </style:style>
    <style:style style:name="P2" style:family="paragraph" style:parent-style-name="Table_20_Contents">
      <style:text-properties style:font-name="Calibri" fo:font-weight="bold" officeooo:rsid="000e32a3" officeooo:paragraph-rsid="001c27b6" style:font-weight-asian="bold" style:font-weight-complex="bold"/>
    </style:style>
    <style:style style:name="P3" style:family="paragraph" style:parent-style-name="Table_20_Contents">
      <style:text-properties style:font-name="Calibri" officeooo:paragraph-rsid="001c27b6"/>
    </style:style>
    <style:style style:name="P4" style:family="paragraph" style:parent-style-name="Table_20_Contents">
      <style:text-properties style:font-name="Calibri" officeooo:rsid="000e32a3" officeooo:paragraph-rsid="001c27b6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Calibri" officeooo:rsid="001ad969" officeooo:paragraph-rsid="001c27b6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Calibri" fo:font-size="15pt" fo:font-weight="bold" officeooo:rsid="001ad969" officeooo:paragraph-rsid="001ad969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libri" officeooo:rsid="001ad969" officeooo:paragraph-rsid="001ad969"/>
    </style:style>
    <style:style style:name="P8" style:family="paragraph" style:parent-style-name="Standard">
      <style:paragraph-properties fo:text-align="justify" style:justify-single-word="false"/>
      <style:text-properties officeooo:paragraph-rsid="001ad969"/>
    </style:style>
    <style:style style:name="P9" style:family="paragraph" style:parent-style-name="Standard">
      <style:paragraph-properties fo:text-align="justify" style:justify-single-word="false"/>
      <style:text-properties style:font-name="Calibri" officeooo:paragraph-rsid="001ad969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Calibri" fo:font-size="14pt" fo:font-weight="bold" officeooo:rsid="001c27b6" officeooo:paragraph-rsid="001c27b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c27b6"/>
    </style:style>
    <style:style style:name="T1" style:family="text">
      <style:text-properties officeooo:rsid="001d6631"/>
    </style:style>
    <style:style style:name="T2" style:family="text">
      <style:text-properties style:font-name="Calibri"/>
    </style:style>
    <style:style style:name="T3" style:family="text">
      <style:text-properties style:font-name="Calibri" fo:font-style="italic"/>
    </style:style>
    <style:style style:name="T4" style:family="text">
      <style:text-properties style:font-name="Calibri" officeooo:rsid="001ad969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1">Projektowanie Oprogramowania Systemów - 2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2">Projekt</text:p>
          </table:table-cell>
          <table:table-cell table:style-name="Tabela1.B2" table:number-columns-spanned="3" office:value-type="string">
            <text:p text:style-name="P3">Automatyczny pomiar funkcji 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2">Wykonujący:</text:p>
          </table:table-cell>
          <table:table-cell table:style-name="Tabela1.B3" table:number-columns-spanned="2" office:value-type="string">
            <text:p text:style-name="P4">Piotr Krzyżanowski 193675</text:p>
            <text:p text:style-name="P4">Hubert Kowalski 193638 </text:p>
          </table:table-cell>
          <table:covered-table-cell/>
          <table:table-cell table:style-name="Tabela1.D3" table:number-rows-spanned="2" office:value-type="string">
            <text:p text:style-name="P4">Ocena:</text:p>
          </table:table-cell>
        </table:table-row>
        <table:table-row table:style-name="Tabela1.1">
          <table:table-cell table:style-name="Tabela1.A2" office:value-type="string">
            <text:p text:style-name="P2">Specjalność:</text:p>
          </table:table-cell>
          <table:table-cell table:style-name="Tabela1.B4" table:number-columns-spanned="2" office:value-type="string">
            <text:p text:style-name="P4">Inżynieria dźwięku i obrazu</text:p>
          </table:table-cell>
          <table:covered-table-cell/>
          <table:covered-table-cell table:style-name="Tabela1.D3"/>
        </table:table-row>
        <table:table-row table:style-name="Tabela1.1">
          <table:table-cell table:style-name="Tabela1.A5" office:value-type="string">
            <text:p text:style-name="P2">Data wykonania ćwiczenia:</text:p>
          </table:table-cell>
          <table:table-cell table:style-name="Tabela1.B5" office:value-type="string">
            <text:p text:style-name="P3">1<text:span text:style-name="T1">7</text:span>.06.2026 </text:p>
          </table:table-cell>
          <table:table-cell table:style-name="Tabela1.C5" office:value-type="string">
            <text:p text:style-name="P3"/>
          </table:table-cell>
          <table:table-cell table:style-name="Tabela1.D5" office:value-type="string">
            <text:p text:style-name="P3"/>
          </table:table-cell>
        </table:table-row>
      </table:table>
      <text:list text:style-name="L1">
        <text:list-header>
          <text:p text:style-name="P5"/>
        </text:list-header>
        <text:list-item>
          <text:p text:style-name="P6">Krótki opis podsumowanych działań</text:p>
        </text:list-item>
      </text:list>
      <text:p text:style-name="P7"/>
      <text:p text:style-name="P8"><text:span text:style-name="T2">W ramach realizacji punktu drugiego uzyskano dostęp do repozytorium systemu kontroli wersji wykorzystując zewnętrzny hosting GitHub. Repozytorium znajduje się pod adresem: </text:span><text:span text:style-name="T3">(tutaj wklej link do Waszego repozytorium)</text:span><text:span text:style-name="T2">. W repozytorium skonfigurowano wbudowany system śledzenia błędów (GitHub Issues), do którego na bieżąco zgłaszane są zadania i wykryte problemy. Zgodnie z założeniami projektowymi, na osobę odpowiedzialną za utrzymanie porządku w repozytorium (Maintainera) wyznaczono Piotra Krzyżanowskiego. Informacja ta została oficjalnie udokumentowana w głównym pliku </text:span><text:span text:style-name="Source_20_Text"><text:span text:style-name="T2">README.md</text:span></text:span><text:span text:style-name="T2"> projektu. </text:span></text:p>
      <text:p text:style-name="P9"/>
      <text:p text:style-name="P9"/>
      <text:list text:continue-numbering="true" text:style-name="L1">
        <text:list-item>
          <text:p text:style-name="P10">Struktura repozytorium</text:p>
        </text:list-item>
      </text:list>
      <text:p text:style-name="P7"/>
      <text:p text:style-name="P11"><text:span text:style-name="T4"><draw:frame draw:style-name="fr1" draw:name="Obraz1" text:anchor-type="as-char" svg:width="6.604cm" svg:height="10.837cm" draw:z-index="0"><draw:image xlink:href="Pictures/1000000100000138000002004BABB411.png" xlink:type="simple" xlink:show="embed" xlink:actuate="onLoad" draw:mime-type="image/png"/></draw:frame></text:span><text:span text:style-name="T4"><text:line-break/><text:line-break/><text:line-break/></text:span><text:soft-page-break/><text:span text:style-name="T5">Dowody realizacji (zrzuty ekranu): </text:span><text:span text:style-name="T4"><text:line-break/><text:line-break/></text:span><text:span text:style-name="T4"><draw:frame draw:style-name="fr1" draw:name="Obraz2" text:anchor-type="as-char" svg:width="17cm" svg:height="6.468cm" draw:z-index="1"><draw:image xlink:href="Pictures/100000010000061E0000025437B90BCD.png" xlink:type="simple" xlink:show="embed" xlink:actuate="onLoad" draw:mime-type="image/png"/></draw:frame></text:span><text:span text:style-name="T4"><text:line-break/><text:line-break/><text:tab/><text:line-break/><text:line-break/><text:line-break/></text:span><text:span text:style-name="T4"><draw:frame draw:style-name="fr2" draw:name="Obraz3" text:anchor-type="as-char" svg:width="17cm" svg:height="6.92cm" draw:z-index="2"><draw:image xlink:href="Pictures/1000000100000750000002FA2F5CC759.png" xlink:type="simple" xlink:show="embed" xlink:actuate="onLoad" draw:mime-type="image/png"/></draw:frame></text:span><text:span text:style-name="T4"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7T22:34:28.702918200</meta:creation-date>
    <meta:print-date>2026-06-21T15:55:09.717743100</meta:print-date>
    <meta:printed-by>Pliki PDF</meta:printed-by>
    <dc:date>2026-06-21T17:49:49.991693700</dc:date>
    <meta:editing-duration>PT45S</meta:editing-duration>
    <meta:editing-cycles>3</meta:editing-cycles>
    <meta:generator>LibreOffice/25.8.7.1$Windows_X86_64 LibreOffice_project/39c3b7ac021cfb9f4ca681457ad36828f90e2ce7</meta:generator>
    <meta:document-statistic meta:table-count="1" meta:image-count="3" meta:object-count="0" meta:page-count="2" meta:paragraph-count="15" meta:word-count="110" meta:character-count="917" meta:non-whitespace-character-count="803"/>
  </office:meta>
</office:document-meta>
</file>