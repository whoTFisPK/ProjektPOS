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000000056E5A2D8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0056" officeooo:paragraph-rsid="00190056"/>
    </style:style>
    <style:style style:name="P2" style:family="paragraph" style:parent-style-name="Standard">
      <style:paragraph-properties fo:text-align="start" style:justify-single-word="false"/>
      <style:text-properties officeooo:rsid="00190056" officeooo:paragraph-rsid="0019005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0056" officeooo:paragraph-rsid="00190056"/>
    </style:style>
    <style:style style:name="P4" style:family="paragraph" style:parent-style-name="Standard">
      <style:paragraph-properties fo:text-align="justify" style:justify-single-word="false"/>
      <style:text-properties officeooo:rsid="00190056" officeooo:paragraph-rsid="00190056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0056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0476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90056"/>
    </style:style>
    <style:style style:name="P8" style:family="paragraph" style:parent-style-name="Standard">
      <style:paragraph-properties fo:text-align="start" style:justify-single-word="false"/>
      <style:text-properties officeooo:paragraph-rsid="001b0476"/>
    </style:style>
    <style:style style:name="P9" style:family="paragraph" style:parent-style-name="Standard">
      <style:paragraph-properties fo:text-align="justify" style:justify-single-word="false"/>
      <style:text-properties officeooo:paragraph-rsid="00190056"/>
    </style:style>
    <style:style style:name="P10" style:family="paragraph" style:parent-style-name="Standard">
      <style:paragraph-properties fo:text-align="justify" style:justify-single-word="false"/>
      <style:text-properties officeooo:rsid="00192788" officeooo:paragraph-rsid="00192788"/>
    </style:style>
    <style:style style:name="P11" style:family="paragraph" style:parent-style-name="Standard">
      <style:paragraph-properties fo:text-align="justify" style:justify-single-word="false"/>
      <style:text-properties style:font-name="Consolas" officeooo:rsid="00192788" officeooo:paragraph-rsid="00192788"/>
    </style:style>
    <style:style style:name="T1" style:family="text">
      <style:text-properties officeooo:rsid="00190056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190056"/>
    </style:style>
    <style:style style:name="T4" style:family="text">
      <style:text-properties officeooo:rsid="00192788"/>
    </style:style>
    <style:style style:name="T5" style:family="text">
      <style:text-properties officeooo:rsid="001b0476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Raportowanie błędów, <text:span text:style-name="T4">podejście TDD oraz testy jednostkowe</text:span></text:p>
      <text:p text:style-name="P1"/>
      <text:p text:style-name="P4"><text:span text:style-name="T4">5.</text:span>1. Raportowanie błędów w systemie śledzenia (Bug Tracking)</text:p>
      <text:p text:style-name="P4"/>
      <text:p text:style-name="P4">W ramach symulacji cyklu testowania oprogramowania, w systemie śledzenia błędów zarejestrowano i pomyślnie rozwiązano krytyczne zgłoszenia. Poniżej znajduje się wyciąg z rejestru błędów:</text:p>
      <text:p text:style-name="P2">Przepełnienie bufora UART przy szybkich zmianach pozycji</text:p>
      <text:list text:style-name="L1">
        <text:list-item>
          <text:p text:style-name="P3">Opis: Podczas generowania dużej liczby punktów pomiarowych, aplikacja w Pythonie wysyłała ramki współrzędnych szybciej, niż Arduino było w stanie przetworzyć zapytanie `<text:span text:style-name="T2">Serial.parseInt()</text:span>`. Skutkowało to gubieniem znaków końca linii `<text:span text:style-name="T2">\n</text:span>` i błędnym pozycjonowaniem.</text:p>
        </text:list-item>
        <text:list-item>
          <text:p text:style-name="P6"><text:span text:style-name="T1">Rozwiązanie: Wprowadzono pętlę blokującą w Pythonie, która bezwzględnie oczekuje na komunikat `</text:span><text:span text:style-name="T3">"done"</text:span><text:span text:style-name="T1">` z Arduino przed wysłaniem kolejnej ramki.</text:span></text:p>
        </text:list-item>
      </text:list>
      <text:p text:style-name="P8"/>
      <text:p text:style-name="P8"><text:span text:style-name="T1">Wycinanie bezpośredniej fali (t0) przy ujemnych wartościach pre_ms</text:span></text:p>
      <text:list text:continue-numbering="true" text:style-name="L1">
        <text:list-item>
          <text:p text:style-name="P5"><text:span text:style-name="T1">Opis: W funkcji `</text:span><text:span text:style-name="T3">measure_ir_sweep</text:span><text:span text:style-name="T1">`, przy próbie ustawienia ujemnego marginesu czasu przed impulsem, indeksowanie tablicy `</text:span><text:span text:style-name="T3">t0 - pre</text:span><text:span text:style-name="T1">` przyjmowało wartości spoza zakresu, co crashowało skrypt.</text:span></text:p>
        </text:list-item>
        <text:list-item>
          <text:p text:style-name="P5"><text:span text:style-name="T1">Rozwiązanie: Dodano walidację typów i zabezpieczenie `</text:span><text:span text:style-name="T3">max(0, t0 - pre)</text:span><text:span text:style-name="T1">` gwarantujące nieprzekroczenie granic tablicy NumPy.</text:span></text:p>
        </text:list-item>
      </text:list>
      <text:p text:style-name="P9"/>
      <text:p text:style-name="P9"/>
      <text:p text:style-name="P9"><text:span text:style-name="T4">5.</text:span>2. Metodyka Test-Driven Development (TDD) – Zapewnienie Jakości</text:p>
      <text:p text:style-name="P9"/>
      <text:p text:style-name="P9">W celu zapewnienia bezbłędnego działania algorytmów cyfrowego przetwarzania sygnałów (DSP), przed napisaniem właściwego kodu implementacji zastosowano technikę TDD (Czerwony-Zielony-Refaktor).</text:p>
      <text:p text:style-name="P9"/>
      <text:p text:style-name="P9">Wprowadzono założenie projektowe: funkcja odpowiedzialna za okienkowanie czasowe (bramkowanie odpowiedzi impulsowej) musi automatycznie dopasować długość okna wygładzającego Tukey'a do wyciętego fragmentu sygnału.</text:p>
      <text:list text:style-name="L2">
        <text:list-item>
          <text:p text:style-name="P7">Faza Czerwona: Napisano test sprawdzający, czy długość okna jest identyczna z długością wyciętego sygnału. Test zakończył się niepowodzeniem (brak implementacji funkcji).</text:p>
        </text:list-item>
        <text:list-item>
          <text:p text:style-name="P7">Faza Zielona: Zaimplementowano kod `<text:span text:style-name="T2">window = sig.windows.tukey(len(hrir_left), alpha=0.25)</text:span>` i przemnożenie sygnału. Test przeszedł pomyślnie.</text:p>
        </text:list-item>
        <text:list-item>
          <text:p text:style-name="P7">Faza Refaktoru: Zoptymalizowano operację do postaci wektorowej NumPy (`<text:span text:style-name="T2">hrir_left *= window</text:span>`), zapewniając maksymalną wydajność CPU.</text:p>
        </text:list-item>
      </text:list>
      <text:p text:style-name="P9"/>
      <text:p text:style-name="P9"/>
      <text:p text:style-name="P9"><text:span text:style-name="T4">5.</text:span>3. Testy Jednostkowe do Walidacji Oprogramowania</text:p>
      <text:p text:style-name="P9"/>
      <text:p text:style-name="P4">Stworzono dedykowany kod testów jednostkowych, który symuluje zachowanie algorytmów bez potrzeby podłączania fizycznego Arduino i głośników.</text:p>
      <text:p text:style-name="P4"/>
      <text:p text:style-name="P4">Wynik wykonania walidacji i testów jednostkowych oprogramowania:</text:p>
      <text:p text:style-name="P4"><draw:frame draw:style-name="fr1" draw:name="Obraz1" text:anchor-type="as-char" svg:width="15.242cm" svg:height="2.275cm" draw:z-index="0"><draw:image xlink:href="Pictures/100000010000024000000056E5A2D82A.png" xlink:type="simple" xlink:show="embed" xlink:actuate="onLoad" draw:mime-type="image/png"/></draw:frame></text:p>
      <text:p text:style-name="P10"><text:soft-page-break/>6. <text:span text:style-name="T5">Optymalizacja</text:span></text:p>
      <text:p text:style-name="P10"/>
      <text:p text:style-name="P10">Za pomocą narzędzia cProfile zidentyfikowano główne punkty krytyczne (hotspots) w opracowanym programie. Największe obciążenie procesora generowała funkcja dekonwolucji `<text:span text:style-name="T2">scipy.signal.convolve</text:span>` realizowana w dziedzinie czasu dla sygnałów o częstotliwości 48 kHz. Optymalizację tego punktu można przeprowadzić poprzez zastąpienie splotu czasowego splotem w dziedzinie częstotliwości (`<text:span text:style-name="T2">scipy.signal.fftconvolve</text:span>`), co skróciłoby czas obliczeń ponad stukrotnie. Drugim zidentyfikowanym hotspotem były operacje wejścia/wyjścia (zapis plików WAV w pętli pomiarowej). Zoptymalizować to można poprzez buforowanie wyników w pamięci RAM i ich seryjny zapis na dysk po zakończeniu procedury ruch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9T14:04:04.309000000</meta:creation-date>
    <dc:date>2026-06-19T14:38:07.673000000</dc:date>
    <meta:editing-duration>PT8M52S</meta:editing-duration>
    <meta:editing-cycles>1</meta:editing-cycles>
    <meta:document-statistic meta:table-count="0" meta:image-count="1" meta:object-count="0" meta:page-count="2" meta:paragraph-count="21" meta:word-count="359" meta:character-count="3024" meta:non-whitespace-character-count="2691"/>
    <meta:generator>LibreOffice/24.2.3.2$Windows_X86_64 LibreOffice_project/433d9c2ded56988e8a90e6b2e771ee4e6a5ab2ba</meta:generator>
  </office:meta>
</office:document-meta>
</file>